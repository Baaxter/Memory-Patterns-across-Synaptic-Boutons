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10000015187669AE1FBB5ABEF1.png" manifest:media-type="image/png"/>
  <manifest:file-entry manifest:full-path="Pictures/10000000000003DB000002C85D2D432E08E438B1.png" manifest:media-type="image/png"/>
  <manifest:file-entry manifest:full-path="Pictures/10000000000003E6000002088216F0220F93C1F4.png" manifest:media-type="image/png"/>
  <manifest:file-entry manifest:full-path="Pictures/1000000100000E10000015188FEB36712B3F2F79.png" manifest:media-type="image/png"/>
  <manifest:file-entry manifest:full-path="Pictures/10000000000001F10000019B519210D0DDC605C1.png" manifest:media-type="image/png"/>
  <manifest:file-entry manifest:full-path="Pictures/1000000100000E100000151811A6F13DE3E7FE6C.png" manifest:media-type="image/png"/>
  <manifest:file-entry manifest:full-path="Pictures/1000000100000E1000001518E56E88370088592E.png" manifest:media-type="image/png"/>
  <manifest:file-entry manifest:full-path="Pictures/1000000000000229000001FA7857E0A12F0DEB67.png" manifest:media-type="image/png"/>
  <manifest:file-entry manifest:full-path="Pictures/100000000000044D00000201FE31A779620D29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2pt"/>
    </style:style>
    <style:style style:name="T1" style:family="text">
      <style:text-properties fo:font-size="22pt"/>
    </style:style>
    <style:style style:name="T2" style:family="text">
      <style:text-properties fo:font-size="10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0.628cm" presentation:class="title" presentation:user-transformed="true">
          <draw:text-box>
            <text:p>Fig 5 B</text:p>
          </draw:text-box>
        </draw:frame>
        <draw:frame draw:style-name="gr1" draw:text-style-name="P1" draw:layer="layout" svg:width="23.495cm" svg:height="10.947cm" svg:x="2.54cm" svg:y="3.023cm">
          <draw:image xlink:href="Pictures/100000000000044D00000201FE31A779620D292F.png" xlink:type="simple" xlink:show="embed" xlink:actuate="onLoad" draw:mime-type="image/png">
            <text:p/>
          </draw:image>
        </draw:frame>
        <draw:frame draw:style-name="gr2" draw:text-style-name="P2" draw:layer="layout" svg:width="14.536cm" svg:height="0.962cm" svg:x="2.54cm" svg:y="14.605cm">
          <draw:text-box>
            <text:p>Same Kcs are shown in Fig 1 G in there pre state 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4" draw:layer="layout" svg:width="25.199cm" svg:height="2.629cm" svg:x="1.27cm" svg:y="-0.724cm" presentation:class="title" presentation:user-transformed="true">
          <draw:text-box>
            <text:p text:style-name="P4"><text:span text:style-name="T1">Fig 5B KC 1 = A_160621_0107_0607_fly1_cell2_pre_post</text:span></text:p>
          </draw:text-box>
        </draw:frame>
        <draw:frame draw:style-name="gr2" draw:text-style-name="P2" draw:layer="layout" svg:width="0.502cm" svg:height="1.039cm" svg:x="3.028cm" svg:y="5.715cm">
          <draw:text-box>
            <text:p><text:span text:style-name="T2"/></text:p>
            <text:p><text:span text:style-name="T2"/></text:p>
          </draw:text-box>
        </draw:frame>
        <draw:frame draw:style-name="gr1" draw:text-style-name="P1" draw:layer="layout" svg:width="11.104cm" svg:height="10.16cm" svg:x="1.02cm" svg:y="1.27cm">
          <draw:image xlink:href="Pictures/1000000000000229000001FA7857E0A12F0DEB67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12.384cm" svg:x="13.335cm" svg:y="1.586cm">
          <draw:image xlink:href="Pictures/1000000100000E1000001518E56E8837008859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2.629cm" svg:x="1.471cm" svg:y="-0.089cm" presentation:class="title" presentation:user-transformed="true">
          <draw:text-box>
            <text:p text:style-name="P1"><text:span text:style-name="T1">Fig 5B KC 2 = A_160621_0107_0607_fly1_cell2_pre_post</text:span></text:p>
          </draw:text-box>
        </draw:frame>
        <draw:frame draw:style-name="gr1" draw:text-style-name="P1" draw:layer="layout" svg:width="11.518cm" svg:height="9.525cm" svg:x="0.635cm" svg:y="2.54cm">
          <draw:image xlink:href="Pictures/10000000000001F10000019B519210D0DDC605C1.png" xlink:type="simple" xlink:show="embed" xlink:actuate="onLoad" draw:mime-type="image/png">
            <text:p/>
          </draw:image>
        </draw:frame>
        <draw:frame draw:style-name="gr1" draw:text-style-name="P1" draw:layer="layout" svg:width="9.731cm" svg:height="12.065cm" svg:x="14.605cm" svg:y="1.905cm">
          <draw:image xlink:href="Pictures/1000000100000E10000015188FEB36712B3F2F7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3.311cm" svg:x="-5.08cm" svg:y="1.134cm" presentation:class="title" presentation:user-transformed="true">
          <draw:text-box>
            <text:p><text:span text:style-name="T3">Fig S7 KC A = </text:span><text:span text:style-name="T3"><text:line-break/></text:span><text:span text:style-name="T3">A_160802_1308_1808_fly2_cell1_pre_post</text:span><text:line-break/></text:p>
          </draw:text-box>
        </draw:frame>
        <draw:frame draw:style-name="gr1" draw:text-style-name="P1" draw:layer="layout" svg:width="12.188cm" svg:height="6.35cm" svg:x="0.635cm" svg:y="3.81cm">
          <draw:image xlink:href="Pictures/10000000000003E6000002088216F0220F93C1F4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14.288cm" svg:x="17.78cm" svg:y="0cm">
          <draw:image xlink:href="Pictures/1000000100000E100000151811A6F13DE3E7FE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2.629cm" svg:x="0.201cm" svg:y="0cm" presentation:class="title" presentation:user-transformed="true">
          <draw:text-box>
            <text:p><text:span text:style-name="T3">Fig S7 KC B </text:span><text:span text:style-name="T3"><text:line-break/></text:span><text:span text:style-name="T3">Could not find a fitting image in testgroup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3.311cm" svg:x="-4.879cm" svg:y="0.499cm" presentation:class="title" presentation:user-transformed="true">
          <draw:text-box>
            <text:p><text:span text:style-name="T3">Fig S7 KC C = </text:span><text:span text:style-name="T3"><text:line-break/></text:span><text:span text:style-name="T3">A_171010_2010_2510_fly1_cell1_pre_post</text:span><text:line-break/></text:p>
          </draw:text-box>
        </draw:frame>
        <draw:frame draw:style-name="gr1" draw:text-style-name="P1" draw:layer="layout" svg:width="14.863cm" svg:height="10.722cm" svg:x="0.767cm" svg:y="3.175cm">
          <draw:image xlink:href="Pictures/10000000000003DB000002C85D2D432E08E438B1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13.335cm" svg:x="17.78cm" svg:y="0.635cm">
          <draw:image xlink:href="Pictures/1000000100000E10000015187669AE1FBB5ABE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4T12:20:25.729001033</meta:creation-date>
    <dc:date>2025-08-04T16:39:19.000342635</dc:date>
    <meta:editing-duration>PT23M42S</meta:editing-duration>
    <meta:editing-cycles>5</meta:editing-cycles>
    <meta:generator>LibreOffice/7.3.7.2$Linux_X86_64 LibreOffice_project/30$Build-2</meta:generator>
    <meta:document-statistic meta:object-count="50"/>
  </office:meta>
</office:document-meta>
</file>